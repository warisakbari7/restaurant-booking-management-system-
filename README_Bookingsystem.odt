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2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ooking System</text:p>
      <text:p text:style-name="Standard"/>
      <text:p text:style-name="Standard">## 📌 Description</text:p>
      <text:p text:style-name="Standard">A full-stack <text:span text:style-name="T1">Table booking </text:span><text:s/>system where users can book services and admins can manage them.</text:p>
      <text:p text:style-name="Standard"/>
      <text:p text:style-name="Standard">## 🚀 Tech Stack</text:p>
      <text:p text:style-name="Standard">- Laravel (Backend API)</text:p>
      <text:p text:style-name="Standard">- Next.js (Frontend)</text:p>
      <text:p text:style-name="Standard">- MySQL (Database)</text:p>
      <text:p text:style-name="Standard"/>
      <text:p text:style-name="Standard">## ✨ Features (Planned)</text:p>
      <text:p text:style-name="Standard">- User authentication</text:p>
      <text:p text:style-name="Standard">- Service listing</text:p>
      <text:p text:style-name="Standard">- Booking system</text:p>
      <text:p text:style-name="Standard">- Admin dashboard</text:p>
      <text:p text:style-name="Standard"/>
      <text:p text:style-name="Standard">## 📊 Status</text:p>
      <text:p text:style-name="Standard">In develop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6:28:55.774723082</meta:creation-date>
    <dc:date>2026-06-30T18:18:28.524482192</dc:date>
    <meta:editing-duration>PT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56" meta:character-count="319" meta:non-whitespace-character-count="276"/>
  </office:meta>
</office:document-meta>
</file>